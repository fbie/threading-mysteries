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1E000001DA1BD88B25.png" manifest:media-type="image/png"/>
  <manifest:file-entry manifest:full-path="Pictures/10005A9C00003808000030FF05564FCD.svg" manifest:media-type="image/svg+xml"/>
  <manifest:file-entry manifest:full-path="Pictures/10000001000002F1000001867A4A9007.png" manifest:media-type="image/png"/>
  <manifest:file-entry manifest:full-path="Pictures/10008BA600004DD90000285A5D7A7E8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1cm" svg:stroke-color="#ff4000" draw:marker-start="Arrowheads_20_1" draw:marker-start-width="0.35cm" draw:marker-end-width="0.35cm" draw:fill="solid" draw:fill-color="#fff5ce" draw:textarea-horizontal-align="justify" draw:textarea-vertical-align="middle" draw:auto-grow-height="true" draw:auto-grow-width="true" fo:min-height="2.598cm" fo:min-width="10.023cm" fo:padding-top="0.15cm" fo:padding-bottom="0.15cm" fo:padding-left="0.15cm" fo:padding-right="0.15cm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f8000" draw:marker-start="Arrowheads_20_1" draw:marker-start-width="0.35cm" draw:marker-end-width="0.35cm" draw:fill="solid" draw:fill-color="#fff5ce" draw:textarea-horizontal-align="justify" draw:auto-grow-height="true" draw:auto-grow-width="true" fo:min-height="0.847cm" fo:min-width="0.847cm" fo:padding-top="0.15cm" fo:padding-bottom="0.15cm" fo:padding-left="0.15cm" fo:padding-right="0.15cm" draw:caption-type="angled-connector-line" draw:caption-gap="0cm" draw:caption-escape-direction="horizontal" draw:caption-escape="50%" draw:caption-fit-line-length="true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f4000" draw:marker-start="Arrowheads_20_1" draw:marker-start-width="0.35cm" draw:marker-end-width="0.35cm" draw:fill="solid" draw:fill-color="#fff5ce" draw:textarea-vertical-align="middle" draw:auto-grow-height="true" draw:auto-grow-width="true" fo:min-height="1.268cm" fo:min-width="5.11cm" fo:padding-top="0.175cm" fo:padding-bottom="0.175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svg:stroke-width="0.1cm" svg:stroke-color="#ff4000" draw:marker-start-width="0.35cm" draw:marker-end-width="0.35cm" draw:fill="none" draw:fill-color="#ffffff" draw:textarea-horizontal-align="justify" draw:textarea-vertical-align="middle" draw:auto-grow-height="false" fo:min-height="6.75cm" fo:min-width="2.5cm" fo:padding-top="0.175cm" fo:padding-bottom="0.175cm" fo:padding-left="0.3cm" fo:padding-right="0.3cm" draw:shadow="hidden" loext:decorative="false"/>
    </style:style>
    <style:style style:name="gr8" style:family="graphic" style:parent-style-name="standard">
      <style:graphic-properties svg:stroke-width="0.1cm" svg:stroke-color="#ff4000" draw:marker-start="Arrowheads_20_1" draw:marker-start-width="0.35cm" draw:marker-end-width="0.35cm" draw:fill="solid" draw:fill-color="#fff5ce" draw:textarea-horizontal-align="justify" draw:auto-grow-height="true" draw:auto-grow-width="true" fo:min-height="0.847cm" fo:min-width="0.847cm" fo:padding-top="0.15cm" fo:padding-bottom="0.15cm" fo:padding-left="0.15cm" fo:padding-right="0.15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le_20_and_20_Conten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54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3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5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left" style:font-independent-line-spacing="true"/>
      <style:text-properties fo:font-size="24pt"/>
    </style:style>
    <style:style style:name="P8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left"/>
      <style:text-properties fo:font-size="18pt"/>
    </style:style>
    <style:style style:name="P10" style:family="paragraph">
      <style:paragraph-properties fo:margin-left="0.953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.953cm" fo:margin-right="0cm" fo:margin-top="0.169cm" fo:margin-bottom="0cm" fo:line-height="100%" fo:text-align="left" fo:text-indent="0cm" style:punctuation-wrap="hanging" loext:tab-stop-distance="0.953cm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12" style:family="paragraph">
      <loext:graphic-properties draw:fill="none"/>
      <style:paragraph-properties fo:text-align="left" style:font-independent-line-spacing="true"/>
      <style:text-properties fo:font-size="16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5ce"/>
      <style:paragraph-properties fo:text-align="center"/>
    </style:style>
    <style:style style:name="P15" style:family="paragraph">
      <style:paragraph-properties fo:margin-left="0.953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16" style:family="paragraph">
      <loext:graphic-properties draw:fill="none"/>
      <style:paragraph-properties fo:margin-left="0.953cm" fo:margin-right="0cm" fo:margin-top="0.169cm" fo:margin-bottom="0cm" fo:line-height="100%" fo:text-align="left" fo:text-indent="0cm" style:punctuation-wrap="hanging" loext:tab-stop-distance="0.953cm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17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902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6287e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60a0b0" loext:opacity="100%" style:text-outline="false" style:text-line-through-style="none" style:text-line-through-type="none" style:text-position="0% 100%" style:font-name="Fira Code" fo:font-size="16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40a07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font-size="1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6287e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902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style:font-name="Fira Code1" fo:font-size="16pt" style:font-size-asian="16pt" style:font-size-complex="16pt"/>
    </style:style>
    <style:style style:name="T28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bold" fo:background-color="#ffffd7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6287e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40a07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902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902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53cm"/>
        <style:text-properties fo:color="#00702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.NET Threading Mysteries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3.062cm" svg:x="1.905cm" svg:y="4.438cm" presentation:class="title" presentation:user-transformed="true">
          <draw:text-box>
            <text:p text:style-name="P1"><text:span text:style-name="T1">.NE</text:span><text:span text:style-name="T1">T </text:span><text:span text:style-name="T1">Thr</text:span><text:span text:style-name="T1">ead</text:span><text:span text:style-name="T1">ing </text:span><text:span text:style-name="T1">My</text:span><text:span text:style-name="T1">ste</text:span><text:span text:style-name="T1">ries</text:span></text:p>
          </draw:text-box>
        </draw:frame>
        <draw:frame draw:name="Subtitle 2" presentation:style-name="pr2" draw:text-style-name="P4" draw:layer="layout" svg:width="17.779cm" svg:height="3.65cm" svg:x="3.81cm" svg:y="8.096cm" presentation:class="subtitle" presentation:user-transformed="true">
          <draw:text-box>
            <text:p text:style-name="P3"><text:span text:style-name="T2">Flori</text:span><text:span text:style-name="T2">an </text:span><text:span text:style-name="T2">Bier</text:span><text:span text:style-name="T2">man</text:span><text:span text:style-name="T2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Wh</text:span><text:span text:style-name="T1">at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list text:style-name="L2">
              <text:list-item>
                <text:p text:style-name="P6"><text:span text:style-name="T3">.NET uses “threads” to structure concurrent computations.</text:span></text:p>
              </text:list-item>
              <text:list-item>
                <text:p text:style-name="P6"><text:span text:style-name="T3">A thread is an independent unit of execution.</text:span></text:p>
              </text:list-item>
              <text:list-item>
                <text:p text:style-name="P6"><text:span text:style-name="T3">Lots of benefits: responsive GUI, higher throughput, more modular code.</text:span></text:p>
              </text:list-item>
              <text:list-item>
                <text:p text:style-name="P6"><text:span text:style-name="T3">Lots of problems: race conditions, deadlocks, starvation, and so on.</text:span></text:p>
              </text:list-item>
              <text:list-item>
                <text:p text:style-name="P6"><text:span text:style-name="T3">Problems are real and hard to detec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t Programmin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</text:span><text:span text:style-name="T1">ncu</text:span><text:span text:style-name="T1">rre</text:span><text:span text:style-name="T1">nt </text:span><text:span text:style-name="T1">Pro</text:span><text:span text:style-name="T1">gra</text:span><text:span text:style-name="T1">m</text:span><text:span text:style-name="T1">mi</text:span><text:span text:style-name="T1">ng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Writing correct threading code is:</text:span></text:p>
            <text:list text:style-name="L2">
              <text:list-item>
                <text:p text:style-name="P8"><text:span text:style-name="T3">“easy”: if you follow the basic patterns; but</text:span></text:p>
              </text:list-item>
              <text:list-item>
                <text:p text:style-name="P8"><text:span text:style-name="T3">“hard”: if you want to have really high performance, </text:span><text:span text:style-name="T3">throughput, etc.</text:span></text:p>
              </text:list-item>
            </text:list>
            <text:p text:style-name="P8"><text:span text:style-name="T3">Analyzing threading bugs is:</text:span></text:p>
            <text:list text:continue-numbering="true" text:style-name="L2">
              <text:list-item>
                <text:p text:style-name="P8"><text:span text:style-name="T3">“harder”: occur spuriously, “Heisenbugs”, debugger </text:span><text:span text:style-name="T3">interferes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sm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ar</text:span><text:span text:style-name="T1">alle</text:span><text:span text:style-name="T1">lis</text:span><text:span text:style-name="T1">m</text:span></text:p>
          </draw:text-box>
        </draw:frame>
        <draw:frame draw:name="Picture 1" draw:style-name="gr2" draw:text-style-name="P9" draw:layer="layout" svg:width="18.202cm" svg:height="9.418cm" svg:x="3.598cm" svg:y="3.316cm">
          <draw:image xlink:href="Pictures/10008BA600004DD90000285A5D7A7E80.svg" xlink:type="simple" xlink:show="embed" xlink:actuate="onLoad" draw:mime-type="image/svg+xml">
            <text:p/>
          </draw:image>
          <draw:image xlink:href="Pictures/10000001000002F1000001867A4A9007.png" xlink:type="simple" xlink:show="embed" xlink:actuate="onLoad" draw:mime-type="image/png"/>
          <svg:desc>slides/vending-machines-parallelism.svg</svg:desc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cy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</text:span><text:span text:style-name="T1">ncu</text:span><text:span text:style-name="T1">rre</text:span><text:span text:style-name="T1">ncy</text:span></text:p>
          </draw:text-box>
        </draw:frame>
        <draw:frame draw:name="Picture 1" draw:style-name="gr2" draw:text-style-name="P9" draw:layer="layout" svg:width="10.759cm" svg:height="9.418cm" svg:x="7.303cm" svg:y="3.316cm">
          <draw:image xlink:href="Pictures/10005A9C00003808000030FF05564FCD.svg" xlink:type="simple" xlink:show="embed" xlink:actuate="onLoad" draw:mime-type="image/svg+xml">
            <text:p/>
          </draw:image>
          <draw:image xlink:href="Pictures/100000010000021E000001DA1BD88B25.png" xlink:type="simple" xlink:show="embed" xlink:actuate="onLoad" draw:mime-type="image/png"/>
          <svg:desc>slides/vending-machines-concurrency.svg</svg:desc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ash Course in .NET Threading 1/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ra</text:span><text:span text:style-name="T1">sh </text:span><text:span text:style-name="T1">Co</text:span><text:span text:style-name="T1">urs</text:span><text:span text:style-name="T1">e in </text:span><text:span text:style-name="T1">.NE</text:span><text:span text:style-name="T1">T </text:span><text:span text:style-name="T1">Thr</text:span><text:span text:style-name="T1">ead</text:span><text:span text:style-name="T1">ing </text:span><text:span text:style-name="T1">1/2</text:span></text:p>
          </draw:text-box>
        </draw:frame>
        <draw:frame draw:name="Content Placeholder 2" presentation:style-name="pr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...);</text:span><text:span text:style-name="T9"><text:line-break/></text:span><text:span text:style-name="T5">t</text:span><text:span text:style-name="T6">.</text:span><text:span text:style-name="T8">Start</text:span><text:span text:style-name="T6">();</text:span><text:span text:style-name="T5"> <text:s text:c="18"/></text:span><text:span text:style-name="T10">// Start thread t.</text:span><text:span text:style-name="T9"><text:line-break/></text:span><text:span text:style-name="T5">t</text:span><text:span text:style-name="T6">.</text:span><text:span text:style-name="T8">Join</text:span><text:span text:style-name="T6">();</text:span><text:span text:style-name="T5"> <text:s text:c="19"/></text:span><text:span text:style-name="T10">// Wait for t to finish.</text:span><text:span text:style-name="T9"><text:line-break/></text:span><text:span text:style-name="T4">var</text:span><text:span text:style-name="T5"> s </text:span><text:span text:style-name="T6">=</text:span><text:span text:style-name="T5"> 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</text:span><text:span text:style-name="T6">...);</text:span><text:span text:style-name="T5"> </text:span><text:span text:style-name="T10">// Submit task to thread pool.</text:span><text:span text:style-name="T9"><text:line-break/></text:span><text:span text:style-name="T5">s</text:span><text:span text:style-name="T6">.</text:span><text:span text:style-name="T8">Wait</text:span><text:span text:style-name="T6">();</text:span><text:span text:style-name="T5"> <text:s text:c="19"/></text:span><text:span text:style-name="T10">// Wait for task s to finish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ash Course in .NET Threading 2/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ra</text:span><text:span text:style-name="T1">sh </text:span><text:span text:style-name="T1">Co</text:span><text:span text:style-name="T1">urs</text:span><text:span text:style-name="T1">e in </text:span><text:span text:style-name="T1">.NE</text:span><text:span text:style-name="T1">T </text:span><text:span text:style-name="T1">Thr</text:span><text:span text:style-name="T1">ead</text:span><text:span text:style-name="T1">ing </text:span><text:span text:style-name="T1">2/2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 </text:span><text:span text:style-name="T6">{</text:span><text:span text:style-name="T9"><text:line-break/></text:span><text:span text:style-name="T5"> <text:s text:c="3"/></text:span><text:span text:style-name="T7">readonly</text:span><text:span text:style-name="T5"> </text:span><text:span text:style-name="T4">object</text:span><text:span text:style-name="T5"> o </text:span><text:span text:style-name="T6">=</text:span><text:span text:style-name="T5"> </text:span><text:span text:style-name="T7">new</text:span><text:span text:style-name="T6">();</text:span><text:span text:style-name="T5"> </text:span><text:span text:style-name="T10">// Why readonly?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F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10">// Lock on o from calling thread.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o</text:span><text:span text:style-name="T6">)</text:span><text:span text:style-name="T5"> </text:span><text:span text:style-name="T6">{</text:span><text:span text:style-name="T5"> </text:span><text:span text:style-name="T6">...</text:span><text:span text:style-name="T5"> </text:span><text:span text:style-name="T6">}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is Sessio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his Session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There are six “threading mysteries”. Each mystery:</text:span></text:p>
            <text:list text:style-name="L2">
              <text:list-item>
                <text:p text:style-name="P8"><text:span text:style-name="T3">takes some kind of input (numbers, files, …);</text:span></text:p>
              </text:list-item>
              <text:list-item>
                <text:p text:style-name="P8"><text:span text:style-name="T3">does </text:span><text:span text:style-name="T11">something</text:span><text:span text:style-name="T3"> with .NET threads; and</text:span></text:p>
              </text:list-item>
              <text:list-item>
                <text:p text:style-name="P8"><text:span text:style-name="T3">comes in up to three variants (A, B, C.)</text:span></text:p>
              </text:list-item>
            </text:list>
            <text:p text:style-name="P8"><text:span text:style-name="T12">Goals:</text:span></text:p>
            <text:list text:style-name="L5">
              <text:list-item text:start-value="1">
                <text:p text:style-name="P8"><text:span text:style-name="T3">experience unexpected(?) behavior;</text:span></text:p>
              </text:list-item>
              <text:list-item>
                <text:p text:style-name="P8"><text:span text:style-name="T3">build a hypothesis about causes; and</text:span></text:p>
              </text:list-item>
              <text:list-item>
                <text:p text:style-name="P8"><text:span text:style-name="T3">connect the two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Task for 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You</text:span><text:span text:style-name="T1">r </text:span><text:span text:style-name="T1">Tas</text:span><text:span text:style-name="T1">k </text:span><text:span text:style-name="T1">for </text:span><text:span text:style-name="T1">Tod</text:span><text:span text:style-name="T1">ay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In small groups (2-3), your task is to:</text:span></text:p>
            <text:list text:style-name="L5">
              <text:list-item>
                <text:p text:style-name="P8"><text:span text:style-name="T3">compile the code;</text:span></text:p>
              </text:list-item>
              <text:list-item>
                <text:p text:style-name="P8"><text:span text:style-name="T12">DO NOT</text:span><text:span text:style-name="T3"> look at the sources; instead</text:span></text:p>
              </text:list-item>
              <text:list-item>
                <text:p text:style-name="P8"><text:span text:style-name="T3">run each variant, use different arguments.</text:span></text:p>
              </text:list-item>
            </text:list>
            <text:p text:style-name="P8"><text:span text:style-name="T3">Observe and interpret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 Now!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o </text:span><text:span text:style-name="T1">No</text:span><text:span text:style-name="T1">w!</text:span></text:p>
          </draw:text-box>
        </draw:frame>
        <draw:frame draw:name="Content Placeholder 2" presentation:style-name="pr5" draw:text-style-name="P12" draw:layer="layout" svg:width="22.859cm" svg:height="9.428cm" svg:x="1.27cm" svg:y="3.334cm" presentation:class="outline" presentation:user-transformed="true">
          <draw:text-box>
            <text:p><text:span text:style-name="T5">$ git clone </text:span><text:span text:style-name="T13">https://codeberg.org/fbie/threading-mysteries.git</text:span></text:p>
            <text:p><text:span text:style-name="T5"/></text:p>
            <text:p><text:span text:style-name="T5">$ cd threading-mysteries</text:span></text:p>
            <text:p><text:span text:style-name="T5"/></text:p>
            <text:p><text:span text:style-name="T5">$ dotnet build threading-mysteries.slnx -c Release</text:span></text:p>
            <text:p><text:span text:style-name="T5">$ dotnet test threading-mysteries-tests.slnx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ving the Mysteries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l</text:span><text:span text:style-name="T1">vin</text:span><text:span text:style-name="T1">g </text:span><text:span text:style-name="T1">the </text:span><text:span text:style-name="T1">My</text:span><text:span text:style-name="T1">ste</text:span><text:span text:style-name="T1">rie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In the code we display:</text:span></text:p>
            <text:list text:style-name="L2">
              <text:list-item>
                <text:p text:style-name="P8"><text:span text:style-name="T3">modifiers like </text:span><text:span text:style-name="T14">readonly</text:span><text:span text:style-name="T3"> are omitted, unless important; and</text:span></text:p>
              </text:list-item>
              <text:list-item>
                <text:p text:style-name="P8"><text:span text:style-name="T3">constructors are omitted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1</text:span></text:p>
          </draw:text-box>
        </draw:frame>
        <draw:frame draw:name="Content Placeholder 2" presentation:style-name="pr9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SequenceBuilder </text:span><text:span text:style-name="T6">{</text:span><text:span text:style-name="T9"><text:line-break/></text:span><text:span text:style-name="T5"> <text:s text:c="3"/></text:span><text:span text:style-name="T4">bool</text:span><text:span text:style-name="T5"> </text:span><text:span text:style-name="T8">Next</text:span><text:span text:style-name="T6">();</text:span><text:span text:style-name="T9"><text:line-break/></text:span><text:span text:style-name="T6">}</text:span><text:span text:style-name="T9"><text:line-break/></text:span><text:span text:style-name="T5">ISqeuenceBuilder b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5"> </text:span><text:span text:style-name="T7">while</text:span><text:span text:style-name="T5"> </text:span><text:span text:style-name="T6">(</text:span><text:span text:style-name="T5">b</text:span><text:span text:style-name="T6">.</text:span><text:span text:style-name="T8">Next</text:span><text:span text:style-name="T6">());</text:span><text:span text:style-name="T5"> </text:span><text:span text:style-name="T6">});</text:span><text:span text:style-name="T9"><text:line-break/></text:span><text:span text:style-name="T5">t</text:span><text:span text:style-name="T6">.</text:span><text:span text:style-name="T8">Start</text:span><text:span text:style-name="T6">();</text:span><text:span text:style-name="T9"><text:line-break/></text:span><text:span text:style-name="T7">while</text:span><text:span text:style-name="T5"> </text:span><text:span text:style-name="T6">(</text:span><text:span text:style-name="T5">b</text:span><text:span text:style-name="T6">.</text:span><text:span text:style-name="T8">Next</text:span><text:span text:style-name="T6">());</text:span><text:span text:style-name="T9"><text:line-break/></text:span><text:span text:style-name="T5">t</text:span><text:span text:style-name="T6">.</text:span><text:span text:style-name="T8">Join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1: A</text:span></text:p>
          </draw:text-box>
        </draw:frame>
        <draw:frame draw:name="Content Placeholder 2" presentation:style-name="pr1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A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</text:span><text:span text:style-name="T4">int</text:span><text:span text:style-name="T5"> _current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1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1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1: </text:span><text:span text:style-name="T1">B</text:span></text:p>
          </draw:text-box>
        </draw:frame>
        <draw:frame draw:name="Content Placeholder 2" presentation:style-name="pr1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B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</text:span><text:span text:style-name="T16">volatile</text:span><text:span text:style-name="T5"> </text:span><text:span text:style-name="T4">int</text:span><text:span text:style-name="T5"> _current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1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1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1: C</text:span></text:p>
          </draw:text-box>
        </draw:frame>
        <draw:frame draw:name="Content Placeholder 2" presentation:style-name="pr1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C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</text:span><text:span text:style-name="T4">int</text:span><text:span text:style-name="T5"> _current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n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5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5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11"/></text:span><text:span text:style-name="T6">}</text:span><text:span text:style-name="T9"><text:line-break/></text:span><text:span text:style-name="T5"> <text:s text:c="11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7"/></text:span><text:span text:style-name="T6">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2</text:span></text:p>
          </draw:text-box>
        </draw:frame>
        <draw:frame draw:name="Content Placeholder 2" presentation:style-name="pr1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Histogram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;</text:span><text:span text:style-name="T9"><text:line-break/></text:span><text:span text:style-name="T5"> <text:s text:c="3"/></text:span><text:span text:style-name="T4">void</text:span><text:span text:style-name="T5"> </text:span><text:span text:style-name="T8">Print</text:span><text:span text:style-name="T6">();</text:span><text:span text:style-name="T9"><text:line-break/></text:span><text:span text:style-name="T6">}</text:span><text:span text:style-name="T9"><text:line-break/></text:span><text:span text:style-name="T5">IHistogram h </text:span><text:span text:style-name="T6">=</text:span><text:span text:style-name="T5"> </text:span><text:span text:style-name="T6">...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1</text:span><text:span text:style-name="T6">;</text:span><text:span text:style-name="T5"> i </text:span><text:span text:style-name="T6">&lt;</text:span><text:span text:style-name="T5"> args</text:span><text:span text:style-name="T6">.</text:span><text:span text:style-name="T8">Length</text:span><text:span text:style-name="T6">;</text:span><text:span text:style-name="T5"> i</text:span><text:span text:style-name="T6">++)</text:span><text:span text:style-name="T5"> </text:span><text:span text:style-name="T6">{</text:span><text:span text:style-name="T9"><text:line-break/></text:span><text:span text:style-name="T5"> <text:s text:c="3"/></text:span><text:span text:style-name="T4">var</text:span><text:span text:style-name="T5"> arg </text:span><text:span text:style-name="T6">=</text:span><text:span text:style-name="T5"> args</text:span><text:span text:style-name="T6">[</text:span><text:span text:style-name="T5">i</text:span><text:span text:style-name="T6">];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content </text:span><text:span text:style-name="T6">=</text:span><text:span text:style-name="T5"> File</text:span><text:span text:style-name="T6">.</text:span><text:span text:style-name="T8">ReadAllText</text:span><text:span text:style-name="T6">(</text:span><text:span text:style-name="T5">arg</text:span><text:span text:style-name="T6">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c </text:span><text:span text:style-name="T7">in</text:span><text:span text:style-name="T5"> content</text:span><text:span text:style-name="T6">)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4">char</text:span><text:span text:style-name="T6">.</text:span><text:span text:style-name="T8">IsLetterOrDigit</text:span><text:span text:style-name="T6">(</text:span><text:span text:style-name="T5">c</text:span><text:span text:style-name="T6">))</text:span><text:span text:style-name="T9"><text:line-break/></text:span><text:span text:style-name="T5"> <text:s text:c="15"/>h</text:span><text:span text:style-name="T6">.</text:span><text:span text:style-name="T8">Add</text:span><text:span text:style-name="T6">(</text:span><text:span text:style-name="T5">c</text:span><text:span text:style-name="T6">);</text:span><text:span text:style-name="T9"><text:line-break/></text:span><text:span text:style-name="T5"> <text:s text:c="7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2: A</text:span></text:p>
          </draw:text-box>
        </draw:frame>
        <draw:frame draw:name="Content Placeholder 2" presentation:style-name="pr1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A </text:span><text:span text:style-name="T6">:</text:span><text:span text:style-name="T5"> IHistogram </text:span><text:span text:style-name="T6">{</text:span><text:span text:style-name="T9"><text:line-break/></text:span><text:span text:style-name="T5"> <text:s text:c="3"/>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hars</text:span><text:span text:style-name="T6">.</text:span><text:span text:style-name="T8">TryGetValue</text:span><text:span text:style-name="T6">(</text:span><text:span text:style-name="T5">c</text:span><text:span text:style-name="T6">,</text:span><text:span text:style-name="T5"> </text:span><text:span text:style-name="T7">out</text:span><text:span text:style-name="T5"> </text:span><text:span text:style-name="T4">var</text:span><text:span text:style-name="T5"> i</text:span><text:span text:style-name="T6">))</text:span><text:span text:style-name="T9"><text:line-break/></text:span><text:span text:style-name="T5"> <text:s text:c="11"/>_chars</text:span><text:span text:style-name="T6">[</text:span><text:span text:style-name="T5">c</text:span><text:span text:style-name="T6">]</text:span><text:span text:style-name="T5"> </text:span><text:span text:style-name="T6">=</text:span><text:span text:style-name="T5"> i </text:span><text:span text:style-name="T6">+</text:span><text:span text:style-name="T5"> </text:span><text:span text:style-name="T15">1</text:span><text:span text:style-name="T6">;</text:span><text:span text:style-name="T9"><text:line-break/></text:span><text:span text:style-name="T5"> <text:s text:c="7"/></text:span><text:span text:style-name="T7">else</text:span><text:span text:style-name="T9"><text:line-break/></text:span><text:span text:style-name="T5"> <text:s text:c="11"/>_chars</text:span><text:span text:style-name="T6">[</text:span><text:span text:style-name="T5">c</text:span><text:span text:style-name="T6">]</text:span><text:span text:style-name="T5"> </text:span><text:span text:style-name="T6">=</text:span><text:span text:style-name="T5"> </text:span><text:span text:style-name="T15">1</text:span><text:span text:style-name="T6">;</text:span><text:span text:style-name="T9"><text:line-break/></text:span><text:span text:style-name="T5"> <text:s text:c="7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2: </text:span><text:span text:style-name="T1">B</text:span></text:p>
          </draw:text-box>
        </draw:frame>
        <draw:frame draw:name="Content Placeholder 2" presentation:style-name="pr1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B </text:span><text:span text:style-name="T6">:</text:span><text:span text:style-name="T5"> IHistogram </text:span><text:span text:style-name="T6">{</text:span><text:span text:style-name="T9"><text:line-break/></text:span><text:span text:style-name="T5"> <text:s text:c="3"/>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char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5">_chars</text:span><text:span text:style-name="T6">.</text:span><text:span text:style-name="T8">TryGetValue</text:span><text:span text:style-name="T6">(</text:span><text:span text:style-name="T5">c</text:span><text:span text:style-name="T6">,</text:span><text:span text:style-name="T5"> </text:span><text:span text:style-name="T7">out</text:span><text:span text:style-name="T5"> </text:span><text:span text:style-name="T4">var</text:span><text:span text:style-name="T5"> i</text:span><text:span text:style-name="T6">))</text:span><text:span text:style-name="T9"><text:line-break/></text:span><text:span text:style-name="T5"> <text:s text:c="15"/>_chars</text:span><text:span text:style-name="T6">[</text:span><text:span text:style-name="T5">c</text:span><text:span text:style-name="T6">]</text:span><text:span text:style-name="T5"> </text:span><text:span text:style-name="T6">=</text:span><text:span text:style-name="T5"> i </text:span><text:span text:style-name="T6">+</text:span><text:span text:style-name="T5"> </text:span><text:span text:style-name="T15">1</text:span><text:span text:style-name="T6">;</text:span><text:span text:style-name="T9"><text:line-break/></text:span><text:span text:style-name="T5"> <text:s text:c="11"/></text:span><text:span text:style-name="T7">else</text:span><text:span text:style-name="T9"><text:line-break/></text:span><text:span text:style-name="T5"> <text:s text:c="15"/>_chars</text:span><text:span text:style-name="T6">[</text:span><text:span text:style-name="T5">c</text:span><text:span text:style-name="T6">]</text:span><text:span text:style-name="T5"> </text:span><text:span text:style-name="T6">=</text:span><text:span text:style-name="T5"> </text:span><text:span text:style-name="T15">1</text:span><text:span text:style-name="T6">;</text:span><text:span text:style-name="T9"><text:line-break/></text:span><text:span text:style-name="T5"> <text:s text:c="11"/></text:span><text:span text:style-name="T6">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2: C</text:span></text:p>
          </draw:text-box>
        </draw:frame>
        <draw:frame draw:name="Content Placeholder 2" presentation:style-name="pr1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C </text:span><text:span text:style-name="T6">:</text:span><text:span text:style-name="T5"> IHistogram </text:span><text:span text:style-name="T6">{</text:span><text:span text:style-name="T9"><text:line-break/></text:span><text:span text:style-name="T5"> <text:s text:c="3"/>Concurrent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chars</text:span><text:span text:style-name="T6">.</text:span><text:span text:style-name="T8">AddOrUpdate</text:span><text:span text:style-name="T6">(</text:span><text:span text:style-name="T5">c</text:span><text:span text:style-name="T6">,</text:span><text:span text:style-name="T9"><text:line-break/></text:span><text:span text:style-name="T5"> <text:s text:c="11"/>_ </text:span><text:span text:style-name="T6">=&gt;</text:span><text:span text:style-name="T5"> </text:span><text:span text:style-name="T15">1</text:span><text:span text:style-name="T6">,</text:span><text:span text:style-name="T9"><text:line-break/></text:span><text:span text:style-name="T5"> <text:s text:c="11"/></text:span><text:span text:style-name="T6">(</text:span><text:span text:style-name="T5">_</text:span><text:span text:style-name="T6">,</text:span><text:span text:style-name="T5"> i</text:span><text:span text:style-name="T6">)</text:span><text:span text:style-name="T5"> </text:span><text:span text:style-name="T6">=&gt;</text:span><text:span text:style-name="T5"> i </text:span><text:span text:style-name="T6">+</text:span><text:span text:style-name="T5"> </text:span><text:span text:style-name="T15">1</text:span><text:span text:style-name="T6">);</text:span><text:span text:style-name="T9"><text:line-break/></text:span><text:span text:style-name="T5"> <text:s text:c="3"/></text:span><text:span text:style-name="T6">}}</text:span></text:p>
          </draw:text-box>
        </draw:frame>
        <draw:caption draw:style-name="gr3" draw:text-style-name="P14" xml:id="id1" draw:id="id1" draw:layer="layout" svg:width="10.323cm" svg:height="2.898cm" svg:x="11.449cm" svg:y="9.839cm" draw:caption-point-x="-2.449cm" draw:caption-point-y="-1.339cm">
          <text:p text:style-name="P13">Non-capturing lambda expressions</text:p>
          <text:p text:style-name="P13">=</text:p>
          <text:p text:style-name="P13">performance critical!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</text:span></text:p>
          </draw:text-box>
        </draw:frame>
        <draw:frame draw:name="Content Placeholder 2" presentation:style-name="pr1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abstract</text:span><text:span text:style-name="T5"> </text:span><text:span text:style-name="T7">class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int</text:span><text:span text:style-name="T5"> Id </text:span><text:span text:style-name="T6">{</text:span><text:span text:style-name="T5"> </text:span><text:span text:style-name="T7">g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7">public</text:span><text:span text:style-name="T5"> </text:span><text:span text:style-name="T4">int</text:span><text:span text:style-name="T5"> Size </text:span><text:span text:style-name="T6">{</text:span><text:span text:style-name="T5"> </text:span><text:span text:style-name="T7">get</text:span><text:span text:style-name="T6">;</text:span><text:span text:style-name="T5"> </text:span><text:span text:style-name="T7">s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7">public</text:span><text:span text:style-name="T5"> Set Parent </text:span><text:span text:style-name="T6">{</text:span><text:span text:style-name="T5"> </text:span><text:span text:style-name="T7">get</text:span><text:span text:style-name="T6">;</text:span><text:span text:style-name="T5"> </text:span><text:span text:style-name="T7">set</text:span><text:span text:style-name="T6">;</text:span><text:span text:style-name="T5"> </text:span><text:span text:style-name="T6">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Set </text:span><text:span text:style-name="T8">Find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Parent </text:span><text:span text:style-name="T6">!=</text:span><text:span text:style-name="T5"> </text:span><text:span text:style-name="T7">this</text:span><text:span text:style-name="T6">)</text:span><text:span text:style-name="T5"> </text:span><text:span text:style-name="T6">{</text:span><text:span text:style-name="T9"><text:line-break/></text:span><text:span text:style-name="T5"> <text:s text:c="11"/>Parent </text:span><text:span text:style-name="T6">=</text:span><text:span text:style-name="T5"> Parent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Parent</text:span><text:span text:style-name="T6">;</text:span><text:span text:style-name="T9"><text:line-break/></text:span><text:span text:style-name="T5"> <text:s text:c="3"/></text:span><text:span text:style-name="T6">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7">abstract</text:span><text:span text:style-name="T5"> Set </text:span><text:span text:style-name="T8">Union</text:span><text:span text:style-name="T6">(</text:span><text:span text:style-name="T5">Set other</text:span><text:span text:style-name="T6">);</text:span></text:p>
          </draw:text-box>
        </draw:frame>
        <draw:caption draw:style-name="gr4" draw:text-style-name="P14" xml:id="id2" draw:id="id2" draw:layer="layout" svg:width="6.901cm" svg:height="1.147cm" svg:x="15.56cm" svg:y="9.17cm" draw:caption-point-x="-5.56cm" draw:caption-point-y="-0.17cm">
          <text:p text:style-name="P13">Optimistic concurrency!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 (continued)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 </text:span><text:span text:style-name="T1">(co</text:span><text:span text:style-name="T1">nti</text:span><text:span text:style-name="T1">nu</text:span><text:span text:style-name="T1">ed)</text:span></text:p>
          </draw:text-box>
        </draw:frame>
        <draw:frame draw:name="Content Placeholder 2" presentation:style-name="pr1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2</text:span><text:span text:style-name="T6">;</text:span><text:span text:style-name="T5"> i </text:span><text:span text:style-name="T6">&lt;</text:span><text:span text:style-name="T5"> args</text:span><text:span text:style-name="T6">.</text:span><text:span text:style-name="T8">Length</text:span><text:span text:style-name="T6">;</text:span><text:span text:style-name="T5"> i</text:span><text:span text:style-name="T6">++)</text:span><text:span text:style-name="T5"> </text:span><text:span text:style-name="T6">{</text:span><text:span text:style-name="T9"><text:line-break/></text:span><text:span text:style-name="T5"> <text:s text:c="3"/></text:span><text:span text:style-name="T4">var</text:span><text:span text:style-name="T5"> arg </text:span><text:span text:style-name="T6">=</text:span><text:span text:style-name="T5"> args</text:span><text:span text:style-name="T6">[</text:span><text:span text:style-name="T5">i</text:span><text:span text:style-name="T6">];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lines </text:span><text:span text:style-name="T6">=</text:span><text:span text:style-name="T5"> File</text:span><text:span text:style-name="T6">.</text:span><text:span text:style-name="T8">ReadAllLines</text:span><text:span text:style-name="T6">(</text:span><text:span text:style-name="T5">arg</text:span><text:span text:style-name="T6">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line </text:span><text:span text:style-name="T7">in</text:span><text:span text:style-name="T5"> line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8">var</text:span><text:span text:style-name="T5"> </text:span><text:span text:style-name="T6">(</text:span><text:span text:style-name="T5">x</text:span><text:span text:style-name="T6">,</text:span><text:span text:style-name="T5"> y</text:span><text:span text:style-name="T6">)</text:span><text:span text:style-name="T5"> </text:span><text:span text:style-name="T6">=</text:span><text:span text:style-name="T5"> </text:span><text:span text:style-name="T8">Split</text:span><text:span text:style-name="T6">(</text:span><text:span text:style-name="T5">line</text:span><text:span text:style-name="T6">);</text:span><text:span text:style-name="T9"><text:line-break/></text:span><text:span text:style-name="T5"> <text:s text:c="11"/>sets</text:span><text:span text:style-name="T6">[</text:span><text:span text:style-name="T5">x</text:span><text:span text:style-name="T6">].</text:span><text:span text:style-name="T8">Union</text:span><text:span text:style-name="T6">(</text:span><text:span text:style-name="T5">sets</text:span><text:span text:style-name="T6">[</text:span><text:span text:style-name="T5">y</text:span><text:span text:style-name="T6">]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3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: </text:span><text:span text:style-name="T1">B</text:span></text:p>
          </draw:text-box>
        </draw:frame>
        <draw:frame draw:name="Content Placeholder 2" presentation:style-name="pr19" draw:text-style-name="P16" draw:layer="layout" svg:width="22.859cm" svg:height="9.428cm" svg:x="1.27cm" svg:y="3.334cm" presentation:class="outline" presentation:user-transformed="true">
          <draw:text-box>
            <text:p text:style-name="P15"><text:span text:style-name="T17">class</text:span><text:span text:style-name="T18"> SetB </text:span><text:span text:style-name="T19">:</text:span><text:span text:style-name="T18"> Set </text:span><text:span text:style-name="T19">{</text:span><text:span text:style-name="T20"><text:line-break/></text:span><text:span text:style-name="T18"> <text:s text:c="3"/></text:span><text:span text:style-name="T21">public </text:span><text:span text:style-name="T22">Set </text:span><text:span text:style-name="T23">Union</text:span><text:span text:style-name="T24">(</text:span><text:span text:style-name="T22">Set other</text:span><text:span text:style-name="T24">)</text:span><text:span text:style-name="T22"> </text:span><text:span text:style-name="T24">=&gt;</text:span><text:span text:style-name="T22"> </text:span><text:span text:style-name="T23">Assign</text:span><text:span text:style-name="T24">(</text:span><text:span text:style-name="T21">this</text:span><text:span text:style-name="T24">,</text:span><text:span text:style-name="T22"> other</text:span><text:span text:style-name="T24">);</text:span><text:span text:style-name="T25"><text:line-break/></text:span><text:span text:style-name="T25"><text:line-break/></text:span><text:span text:style-name="T22"> <text:s text:c="3"/></text:span><text:span text:style-name="T21">static</text:span><text:span text:style-name="T22"> Set </text:span><text:span text:style-name="T23">Assign</text:span><text:span text:style-name="T24">(</text:span><text:span text:style-name="T22">Set x</text:span><text:span text:style-name="T24">,</text:span><text:span text:style-name="T22"> Set y</text:span><text:span text:style-name="T24">)</text:span><text:span text:style-name="T22"> </text:span><text:span text:style-name="T24">{</text:span><text:span text:style-name="T25"><text:line-break/></text:span><text:span text:style-name="T22"> <text:s text:c="7"/>x </text:span><text:span text:style-name="T24">=</text:span><text:span text:style-name="T22"> x</text:span><text:span text:style-name="T24">.</text:span><text:span text:style-name="T23">Find</text:span><text:span text:style-name="T24">();</text:span><text:span text:style-name="T22"> y </text:span><text:span text:style-name="T24">=</text:span><text:span text:style-name="T22"> y</text:span><text:span text:style-name="T24">.</text:span><text:span text:style-name="T23">Find</text:span><text:span text:style-name="T24">();</text:span><text:span text:style-name="T25"><text:line-break/></text:span><text:span text:style-name="T22"> <text:s text:c="7"/></text:span><text:span text:style-name="T21">if</text:span><text:span text:style-name="T22"> </text:span><text:span text:style-name="T24">(</text:span><text:span text:style-name="T22">x </text:span><text:span text:style-name="T24">==</text:span><text:span text:style-name="T22"> y</text:span><text:span text:style-name="T24">)</text:span><text:span text:style-name="T22"> </text:span><text:span text:style-name="T21">return</text:span><text:span text:style-name="T22"> x</text:span><text:span text:style-name="T24">;</text:span><text:span text:style-name="T25"><text:line-break/></text:span><text:span text:style-name="T22"> <text:s text:c="7"/></text:span><text:span text:style-name="T21">if</text:span><text:span text:style-name="T22"> </text:span><text:span text:style-name="T24">(</text:span><text:span text:style-name="T22">x</text:span><text:span text:style-name="T24">.</text:span><text:span text:style-name="T23">Size</text:span><text:span text:style-name="T22"> </text:span><text:span text:style-name="T24">&lt;</text:span><text:span text:style-name="T22"> y</text:span><text:span text:style-name="T24">.</text:span><text:span text:style-name="T23">Size</text:span><text:span text:style-name="T24">)</text:span><text:span text:style-name="T22"> </text:span><text:span text:style-name="T24">(</text:span><text:span text:style-name="T22">x</text:span><text:span text:style-name="T24">,</text:span><text:span text:style-name="T22"> y</text:span><text:span text:style-name="T24">)</text:span><text:span text:style-name="T22"> </text:span><text:span text:style-name="T24">=</text:span><text:span text:style-name="T22"> </text:span><text:span text:style-name="T24">(</text:span><text:span text:style-name="T22">y</text:span><text:span text:style-name="T24">,</text:span><text:span text:style-name="T22"> x</text:span><text:span text:style-name="T24">);</text:span><text:span text:style-name="T25"><text:line-break/></text:span><text:span text:style-name="T22"> <text:s text:c="7"/>y</text:span><text:span text:style-name="T24">.</text:span><text:span text:style-name="T23">_parent</text:span><text:span text:style-name="T22"> </text:span><text:span text:style-name="T24">=</text:span><text:span text:style-name="T22"> x</text:span><text:span text:style-name="T24">;</text:span><text:span text:style-name="T25"><text:line-break/></text:span><text:span text:style-name="T22"> <text:s text:c="7"/></text:span><text:span text:style-name="T26">var</text:span><text:span text:style-name="T22"> size </text:span><text:span text:style-name="T24">=</text:span><text:span text:style-name="T22"> x</text:span><text:span text:style-name="T24">.</text:span><text:span text:style-name="T23">Size</text:span><text:span text:style-name="T22"> </text:span><text:span text:style-name="T24">+</text:span><text:span text:style-name="T22"> y</text:span><text:span text:style-name="T24">.</text:span><text:span text:style-name="T23">Size</text:span><text:span text:style-name="T24">;</text:span><text:span text:style-name="T25"><text:line-break/></text:span><text:span text:style-name="T22"> <text:s text:c="7"/>x</text:span><text:span text:style-name="T24">.</text:span><text:span text:style-name="T23">Size</text:span><text:span text:style-name="T22"> </text:span><text:span text:style-name="T24">=</text:span><text:span text:style-name="T22"> size</text:span><text:span text:style-name="T24">;</text:span><text:span text:style-name="T22"> y</text:span><text:span text:style-name="T24">.</text:span><text:span text:style-name="T23">Size</text:span><text:span text:style-name="T22"> </text:span><text:span text:style-name="T24">=</text:span><text:span text:style-name="T22"> size</text:span><text:span text:style-name="T24">;</text:span><text:span text:style-name="T25"><text:line-break/></text:span><text:span text:style-name="T22"> <text:s text:c="7"/></text:span><text:span text:style-name="T21">return</text:span><text:span text:style-name="T22"> x</text:span><text:span text:style-name="T24">;</text:span><text:span text:style-name="T25"><text:line-break/></text:span><text:span text:style-name="T22"> <text:s text:c="3"/></text:span><text:span text:style-name="T24">}</text:span><text:span text:style-name="T25"><text:line-break/></text:span><text:span text:style-name="T24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: C</text:span></text:p>
          </draw:text-box>
        </draw:frame>
        <draw:frame draw:name="Content Placeholder 2" presentation:style-name="pr2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SetC </text:span><text:span text:style-name="T6">: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Set </text:span><text:span text:style-name="T8">Union</text:span><text:span text:style-name="T6">(</text:span><text:span text:style-name="T5">Set oth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x </text:span><text:span text:style-name="T6">=</text:span><text:span text:style-name="T5"> </text:span><text:span text:style-name="T7">this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4">var</text:span><text:span text:style-name="T5"> y </text:span><text:span text:style-name="T6">=</text:span><text:span text:style-name="T5"> other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x</text:span><text:span text:style-name="T6">)</text:span><text:span text:style-name="T5"> </text:span><text:span text:style-name="T6">{</text:span></text:p>
            <text:p text:style-name="P10"><text:span text:style-name="T6"><text:s text:c="12"/></text:span><text:span text:style-name="T7">lock</text:span><text:span text:style-name="T5"> </text:span><text:span text:style-name="T6">(</text:span><text:span text:style-name="T5">y</text:span><text:span text:style-name="T6">)</text:span><text:span text:style-name="T5"> </text:span><text:span text:style-name="T6">{</text:span><text:span text:style-name="T9"><text:line-break/></text:span><text:span text:style-name="T5"> <text:s text:c="15"/></text:span><text:span text:style-name="T7">return</text:span><text:span text:style-name="T5"> </text:span><text:span text:style-name="T8">Assign</text:span><text:span text:style-name="T6">(</text:span><text:span text:style-name="T5">x</text:span><text:span text:style-name="T6">,</text:span><text:span text:style-name="T5"> y</text:span><text:span text:style-name="T6">);</text:span><text:span text:style-name="T9"><text:line-break/></text:span><text:span text:style-name="T5"> <text:s text:c="7"/></text:span><text:span text:style-name="T6">}}}}</text:span></text:p>
          </draw:text-box>
        </draw:frame>
        <draw:caption draw:style-name="gr5" draw:text-style-name="P14" xml:id="id3" draw:id="id3" draw:layer="layout" svg:width="5.71cm" svg:height="3.163cm" svg:x="12.171cm" svg:y="8.998cm" draw:caption-point-x="-4.671cm" draw:caption-point-y="-0.998cm">
          <text:p text:style-name="P13">Deadlock risk!</text:p>
          <text:p text:style-name="P13"/>
          <text:p text:style-name="P13"><text:span text:style-name="T27">a.Union(b);</text:span></text:p>
          <text:p text:style-name="P13"><text:span text:style-name="T27">b.Union(a);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: A</text:span></text:p>
          </draw:text-box>
        </draw:frame>
        <draw:frame draw:name="Content Placeholder 2" presentation:style-name="pr2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SetA </text:span><text:span text:style-name="T6">: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Set </text:span><text:span text:style-name="T8">Union</text:span><text:span text:style-name="T6">(</text:span><text:span text:style-name="T5">Set oth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x </text:span><text:span text:style-name="T6">=</text:span><text:span text:style-name="T5"> </text:span><text:span text:style-name="T7">this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4">var</text:span><text:span text:style-name="T5"> y </text:span><text:span text:style-name="T6">=</text:span><text:span text:style-name="T5"> other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28">if</text:span><text:span text:style-name="T16"> </text:span><text:span text:style-name="T29">(</text:span><text:span text:style-name="T16">y</text:span><text:span text:style-name="T29">.</text:span><text:span text:style-name="T30">Id</text:span><text:span text:style-name="T16"> </text:span><text:span text:style-name="T29">&lt;</text:span><text:span text:style-name="T16"> x</text:span><text:span text:style-name="T29">.</text:span><text:span text:style-name="T30">Id</text:span><text:span text:style-name="T29">)</text:span><text:span text:style-name="T16"> </text:span><text:span text:style-name="T29">{</text:span><text:span text:style-name="T9"><text:line-break/></text:span><text:span text:style-name="T5"> <text:s text:c="7"/></text:span><text:span text:style-name="T16"><text:s text:c="4"/></text:span><text:span text:style-name="T29">(</text:span><text:span text:style-name="T16">x</text:span><text:span text:style-name="T29">,</text:span><text:span text:style-name="T16"> y</text:span><text:span text:style-name="T29">)</text:span><text:span text:style-name="T16"> </text:span><text:span text:style-name="T29">=</text:span><text:span text:style-name="T16"> </text:span><text:span text:style-name="T29">(</text:span><text:span text:style-name="T16">y</text:span><text:span text:style-name="T29">,</text:span><text:span text:style-name="T16"> x</text:span><text:span text:style-name="T29">);</text:span><text:span text:style-name="T9"><text:line-break/></text:span><text:span text:style-name="T5"> <text:s text:c="7"/></text:span><text:span text:style-name="T29">}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x</text:span><text:span text:style-name="T6">)</text:span><text:span text:style-name="T5"> </text:span><text:span text:style-name="T6">{</text:span></text:p>
            <text:p text:style-name="P10"><text:span text:style-name="T6"><text:s text:c="12"/></text:span><text:span text:style-name="T7">lock</text:span><text:span text:style-name="T5"> </text:span><text:span text:style-name="T6">(</text:span><text:span text:style-name="T5">y</text:span><text:span text:style-name="T6">)</text:span><text:span text:style-name="T5"> </text:span><text:span text:style-name="T6">{</text:span><text:span text:style-name="T9"><text:line-break/></text:span><text:span text:style-name="T5"> <text:s text:c="15"/></text:span><text:span text:style-name="T7">return</text:span><text:span text:style-name="T5"> </text:span><text:span text:style-name="T8">Assign</text:span><text:span text:style-name="T6">(</text:span><text:span text:style-name="T5">x</text:span><text:span text:style-name="T6">,</text:span><text:span text:style-name="T5"> y</text:span><text:span text:style-name="T6">);</text:span><text:span text:style-name="T9"><text:line-break/></text:span><text:span text:style-name="T5"> <text:s text:c="7"/></text:span><text:span text:style-name="T6">}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</text:span></text:p>
          </draw:text-box>
        </draw:frame>
        <draw:frame draw:name="Content Placeholder 2" presentation:style-name="pr2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Counter </text:span><text:span text:style-name="T6">{</text:span><text:span text:style-name="T9"><text:line-break/></text:span><text:span text:style-name="T5"> <text:s text:c="3"/></text:span><text:span text:style-name="T4">long</text:span><text:span text:style-name="T5"> Value </text:span><text:span text:style-name="T6">{</text:span><text:span text:style-name="T5"> </text:span><text:span text:style-name="T7">g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;</text:span><text:span text:style-name="T9"><text:line-break/></text:span><text:span text:style-name="T6">}</text:span><text:span text:style-name="T9"><text:line-break/></text:span><text:span text:style-name="T5">ICounter c </text:span><text:span text:style-name="T6">=</text:span><text:span text:style-name="T5"> </text:span><text:span text:style-name="T6">...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0</text:span><text:span text:style-name="T6">;</text:span><text:span text:style-name="T5"> i </text:span><text:span text:style-name="T6">&lt;</text:span><text:span text:style-name="T5"> threads</text:span><text:span text:style-name="T6">;</text:span><text:span text:style-name="T5"> i</text:span><text:span text:style-name="T6">++)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7">for</text:span><text:span text:style-name="T5"> </text:span><text:span text:style-name="T6">(</text:span><text:span text:style-name="T4">var</text:span><text:span text:style-name="T5"> j </text:span><text:span text:style-name="T6">=</text:span><text:span text:style-name="T5"> </text:span><text:span text:style-name="T15">0</text:span><text:span text:style-name="T6">;</text:span><text:span text:style-name="T5"> j </text:span><text:span text:style-name="T6">&lt;</text:span><text:span text:style-name="T5"> increments</text:span><text:span text:style-name="T6">;</text:span><text:span text:style-name="T5"> j</text:span><text:span text:style-name="T6">++)</text:span><text:span text:style-name="T9"><text:line-break/></text:span><text:span text:style-name="T5"> <text:s text:c="11"/>counter</text:span><text:span text:style-name="T6">.</text:span><text:span text:style-name="T8">Increment</text:span><text:span text:style-name="T6">();</text:span><text:span text:style-name="T9"><text:line-break/></text:span><text:span text:style-name="T5"> <text:s text:c="3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: C</text:span></text:p>
          </draw:text-box>
        </draw:frame>
        <draw:frame draw:name="Content Placeholder 2" presentation:style-name="pr2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ounterC </text:span><text:span text:style-name="T6">:</text:span><text:span text:style-name="T5"> ICounter </text:span><text:span text:style-name="T6">{</text:span><text:span text:style-name="T9"><text:line-break/></text:span><text:span text:style-name="T5"> <text:s text:c="3"/></text:span><text:span text:style-name="T7">readonly</text:span><text:span text:style-name="T5"> </text:span><text:span text:style-name="T4">object</text:span><text:span text:style-name="T5"> _lock </text:span><text:span text:style-name="T6">=</text:span><text:span text:style-name="T5"> </text:span><text:span text:style-name="T7">new</text:span><text:span text:style-name="T5"> </text:span><text:span text:style-name="T4">object</text:span><text:span text:style-name="T6">();</text:span><text:span text:style-name="T9"><text:line-break/></text:span><text:span text:style-name="T5"> <text:s text:c="3"/></text:span><text:span text:style-name="T4">long</text:span><text:span text:style-name="T5"> _value </text:span><text:span text:style-name="T6">=</text:span><text:span text:style-name="T5"> </text:span><text:span text:style-name="T15">0L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 </text:span><text:span text:style-name="T6">{</text:span><text:span text:style-name="T5"> </text:span><text:span text:style-name="T7">get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lock</text:span><text:span text:style-name="T6">)</text:span><text:span text:style-name="T5"> </text:span><text:span text:style-name="T6">{</text:span><text:span text:style-name="T5"> </text:span><text:span text:style-name="T7">return</text:span><text:span text:style-name="T5"> _value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6">}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lock</text:span><text:span text:style-name="T6">)</text:span><text:span text:style-name="T5"> </text:span><text:span text:style-name="T6">{</text:span><text:span text:style-name="T5"> _value </text:span><text:span text:style-name="T6">+=</text:span><text:span text:style-name="T5"> value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: A</text:span></text:p>
          </draw:text-box>
        </draw:frame>
        <draw:frame draw:name="Content Placeholder 2" presentation:style-name="pr2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ounterA </text:span><text:span text:style-name="T6">:</text:span><text:span text:style-name="T5"> ICounter </text:span><text:span text:style-name="T6">{</text:span><text:span text:style-name="T9"><text:line-break/></text:span><text:span text:style-name="T5"> <text:s text:c="3"/></text:span><text:span text:style-name="T4">long</text:span><text:span text:style-name="T5"> _value </text:span><text:span text:style-name="T6">=</text:span><text:span text:style-name="T5"> </text:span><text:span text:style-name="T15">0L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</text:span><text:span text:style-name="T9"><text:line-break/></text:span><text:span text:style-name="T5"> <text:s text:c="7"/></text:span><text:span text:style-name="T6">=&gt;</text:span><text:span text:style-name="T5"> Interlocked</text:span><text:span text:style-name="T6">.</text:span><text:span text:style-name="T8">Read</text:span><text:span text:style-name="T6">(</text:span><text:span text:style-name="T7">ref</text:span><text:span text:style-name="T5"> _value</text:span><text:span text:style-name="T6">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Interlocked</text:span><text:span text:style-name="T6">.</text:span><text:span text:style-name="T8">Add</text:span><text:span text:style-name="T6">(</text:span><text:span text:style-name="T7">ref</text:span><text:span text:style-name="T5"> _value</text:span><text:span text:style-name="T6">,</text:span><text:span text:style-name="T5"> value</text:span><text:span text:style-name="T6">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: </text:span><text:span text:style-name="T1">B</text:span></text:p>
          </draw:text-box>
        </draw:frame>
        <draw:frame draw:name="Content Placeholder 2" presentation:style-name="pr2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</text:span><text:span text:style-name="T7">class</text:span><text:span text:style-name="T5"> CounterB </text:span><text:span text:style-name="T6">:</text:span><text:span text:style-name="T5"> ICounter</text:span><text:span text:style-name="T9"><text:line-break/></text:span><text:span text:style-name="T6">{</text:span><text:span text:style-name="T9"><text:line-break/></text:span><text:span text:style-name="T5"> <text:s text:c="3"/></text:span><text:span text:style-name="T29">[</text:span><text:span text:style-name="T30">StructLayout</text:span><text:span text:style-name="T29">(</text:span><text:span text:style-name="T16">LayoutKind</text:span><text:span text:style-name="T29">.</text:span><text:span text:style-name="T30">Explicit</text:span><text:span text:style-name="T29">,</text:span><text:span text:style-name="T16"> Size</text:span><text:span text:style-name="T29">=</text:span><text:span text:style-name="T31">64</text:span><text:span text:style-name="T29">)]</text:span><text:span text:style-name="T9"><text:line-break/></text:span><text:span text:style-name="T5"> <text:s text:c="3"/></text:span><text:span text:style-name="T28">struct</text:span><text:span text:style-name="T16"> PaddedLong </text:span><text:span text:style-name="T29">{</text:span><text:span text:style-name="T16"> </text:span><text:span text:style-name="T29">[</text:span><text:span text:style-name="T30">FieldOffset</text:span><text:span text:style-name="T29">(</text:span><text:span text:style-name="T31">0</text:span><text:span text:style-name="T29">)]</text:span><text:span text:style-name="T16"> </text:span><text:span text:style-name="T28">public</text:span><text:span text:style-name="T16"> </text:span><text:span text:style-name="T32">long</text:span><text:span text:style-name="T16"> Value</text:span><text:span text:style-name="T29">;</text:span><text:span text:style-name="T16"> </text:span><text:span text:style-name="T29">}</text:span><text:span text:style-name="T9"><text:line-break/></text:span><text:span text:style-name="T9"><text:line-break/></text:span><text:span text:style-name="T5"> <text:s text:c="3"/></text:span><text:span text:style-name="T7">readonly</text:span><text:span text:style-name="T5"> PaddedLong</text:span><text:span text:style-name="T6">[]</text:span><text:span text:style-name="T5"> _values </text:span><text:span text:style-name="T6">=</text:span><text:span text:style-name="T5"> </text:span><text:span text:style-name="T7">new</text:span><text:span text:style-name="T5"> PaddedLong</text:span><text:span text:style-name="T6">[</text:span><text:span text:style-name="T15">32</text:span><text:span text:style-name="T6">]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</text:span><text:span text:style-name="T9"><text:line-break/></text:span><text:span text:style-name="T5"> <text:s text:c="7"/></text:span><text:span text:style-name="T6">=&gt;</text:span><text:span text:style-name="T5"> _values</text:span><text:span text:style-name="T6">.</text:span><text:span text:style-name="T8">Sum</text:span><text:span text:style-name="T6">(</text:span><text:span text:style-name="T5">p </text:span><text:span text:style-name="T6">=&gt;</text:span><text:span text:style-name="T5"> Interlocked</text:span><text:span text:style-name="T6">.</text:span><text:span text:style-name="T8">Read</text:span><text:span text:style-name="T6">(</text:span><text:span text:style-name="T7">ref</text:span><text:span text:style-name="T5"> p</text:span><text:span text:style-name="T6">.</text:span><text:span text:style-name="T8">Value</text:span><text:span text:style-name="T6">)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n </text:span><text:span text:style-name="T6">=</text:span><text:span text:style-name="T5"> Thread</text:span><text:span text:style-name="T6">.</text:span><text:span text:style-name="T8">CurrentThread</text:span><text:span text:style-name="T6">.</text:span><text:span text:style-name="T8">ManagedThreadId</text:span><text:span text:style-name="T5"> </text:span><text:span text:style-name="T6">%</text:span><text:span text:style-name="T5"> </text:span><text:span text:style-name="T15">32</text:span><text:span text:style-name="T6">;</text:span><text:span text:style-name="T9"><text:line-break/></text:span><text:span text:style-name="T5"> <text:s text:c="7"/>Interlocked</text:span><text:span text:style-name="T6">.</text:span><text:span text:style-name="T8">Add</text:span><text:span text:style-name="T6">(</text:span><text:span text:style-name="T7">ref</text:span><text:span text:style-name="T5"> _values</text:span><text:span text:style-name="T6">[</text:span><text:span text:style-name="T5">n</text:span><text:span text:style-name="T6">].</text:span><text:span text:style-name="T8">Value</text:span><text:span text:style-name="T6">,</text:span><text:span text:style-name="T5"> value</text:span><text:span text:style-name="T6">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 Caches and False Sharin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P</text:span><text:span text:style-name="T1">U </text:span><text:span text:style-name="T1">Cac</text:span><text:span text:style-name="T1">hes </text:span><text:span text:style-name="T1">an</text:span><text:span text:style-name="T1">d </text:span><text:span text:style-name="T1">Fal</text:span><text:span text:style-name="T1">se </text:span><text:span text:style-name="T1">Sha</text:span><text:span text:style-name="T1">rin</text:span><text:span text:style-name="T1">g</text:span></text:p>
          </draw:text-box>
        </draw:frame>
        <draw:frame draw:name="Content Placeholder 5" draw:style-name="gr6" draw:layer="layout" svg:width="22.859cm" svg:height="8.004cm" svg:x="1.27cm" svg:y="3.3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7"><text:span text:style-name="T33">Cache Line</text:span></text:p>
              </table:table-cell>
              <table:table-cell>
                <text:p text:style-name="P17"><text:span text:style-name="T33">1</text:span></text:p>
              </table:table-cell>
              <table:table-cell>
                <text:p text:style-name="P17"><text:span text:style-name="T33">2</text:span></text:p>
              </table:table-cell>
              <table:table-cell>
                <text:p text:style-name="P17"><text:span text:style-name="T33">3</text:span></text:p>
              </table:table-cell>
              <table:table-cell>
                <text:p text:style-name="P17"><text:span text:style-name="T33">4</text:span></text:p>
              </table:table-cell>
              <table:table-cell>
                <text:p text:style-name="P17"><text:span text:style-name="T33">5</text:span></text:p>
              </table:table-cell>
              <table:table-cell>
                <text:p text:style-name="P17"><text:span text:style-name="T33">6</text:span></text:p>
              </table:table-cell>
              <table:table-cell>
                <text:p text:style-name="P17"><text:span text:style-name="T33">7</text:span></text:p>
              </table:table-cell>
              <table:table-cell>
                <text:p text:style-name="P17"><text:span text:style-name="T33">8</text:span></text:p>
              </table:table-cell>
            </table:table-row>
            <table:table-row table:style-name="ro1" table:default-cell-style-name="ce3">
              <table:table-cell table:style-name="ce2">
                <text:p text:style-name="P17"><text:span text:style-name="T34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7"><text:span text:style-name="T34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7"><text:span text:style-name="T34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7"><text:span text:style-name="T34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7"><text:span text:style-name="T34">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7"><text:span text:style-name="T34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7"><text:span text:style-name="T34">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7"><text:span text:style-name="T34">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7" draw:text-style-name="P18" xml:id="id4" draw:id="id4" draw:layer="layout" svg:width="3cm" svg:height="7cm" svg:x="3.5cm" svg:y="4.5cm">
          <text:p/>
          <draw:enhanced-geometry svg:viewBox="0 0 21600 21600" draw:type="rectangle" draw:enhanced-path="M 0 0 L 21600 0 21600 21600 0 21600 0 0 Z N"/>
        </draw:custom-shape>
        <draw:caption draw:style-name="gr8" draw:text-style-name="P14" xml:id="id5" draw:id="id5" draw:layer="layout" svg:width="2.597cm" svg:height="1.147cm" svg:x="10.894cm" svg:y="11.7cm" draw:caption-point-x="-5.394cm" draw:caption-point-y="-1.7cm">
          <text:p text:style-name="P13">Payload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5</text:span></text:p>
          </draw:text-box>
        </draw:frame>
        <draw:frame draw:name="Content Placeholder 2" presentation:style-name="pr2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Factorizer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Run</text:span><text:span text:style-name="T6">();</text:span><text:span text:style-name="T9"><text:line-break/></text:span><text:span text:style-name="T6">}</text:span><text:span text:style-name="T9"><text:line-break/></text:span><text:span text:style-name="T5">IFactorizer f </text:span><text:span text:style-name="T6">=</text:span><text:span text:style-name="T5"> </text:span><text:span text:style-name="T6">...;</text:span><text:span text:style-name="T9"><text:line-break/></text:span><text:span text:style-name="T5">ConcurrentBag</text:span><text:span text:style-name="T6">&lt;</text:span><text:span text:style-name="T4">int</text:span><text:span text:style-name="T6">&gt;</text:span><text:span text:style-name="T5"> input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factors </text:span><text:span text:style-name="T6">=</text:span><text:span text:style-name="T5"> f</text:span><text:span text:style-name="T6">.</text:span><text:span text:style-name="T8">Run</text:span><text:span text:style-name="T6">(</text:span><text:span text:style-name="T5">input</text:span><text:span text:style-name="T6">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5: A</text:span></text:p>
          </draw:text-box>
        </draw:frame>
        <draw:frame draw:name="Content Placeholder 2" presentation:style-name="pr2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A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</text:span><text:span text:style-name="T4">var</text:span><text:span text:style-name="T5"> ts </text:span><text:span text:style-name="T6">=</text:span><text:span text:style-name="T5"> </text:span><text:span text:style-name="T7">new</text:span><text:span text:style-name="T5"> List</text:span><text:span text:style-name="T6">&lt;</text:span><text:span text:style-name="T5">Thread</text:span><text:span text:style-name="T6">&gt;(</text:span><text:span text:style-name="T5">ns</text:span><text:span text:style-name="T6">.</text:span><text:span text:style-name="T8">Count</text:span><text:span text:style-name="T6">);</text:span><text:span text:style-name="T9"><text:line-break/></text:span><text:span text:style-name="T5"> <text:s text:c="7"/></text:span><text:span text:style-name="T7">while</text:span><text:span text:style-name="T5"> </text:span><text:span text:style-name="T6">(</text:span><text:span text:style-name="T5">_ns</text:span><text:span text:style-name="T6">.</text:span><text:span text:style-name="T8">TryTake</text:span><text:span text:style-name="T6">(</text:span><text:span text:style-name="T7">out</text:span><text:span text:style-name="T5"> </text:span><text:span text:style-name="T4">var</text:span><text:span text:style-name="T5"> n</text:span><text:span text:style-name="T6">))</text:span><text:span text:style-name="T5"> </text:span><text:span text:style-name="T6">{</text:span><text:span text:style-name="T9"><text:line-break/></text:span><text:span text:style-name="T5"> <text:s text:c="11"/></text:span><text:span text:style-name="T32">var</text:span><text:span text:style-name="T16"> t </text:span><text:span text:style-name="T29">=</text:span><text:span text:style-name="T16"> </text:span><text:span text:style-name="T28">new</text:span><text:span text:style-name="T16"> </text:span><text:span text:style-name="T30">Thread</text:span><text:span text:style-name="T29">(()</text:span><text:span text:style-name="T16"> </text:span><text:span text:style-name="T29">=&gt;</text:span><text:span text:style-name="T16"> </text:span><text:span text:style-name="T29">{</text:span><text:span text:style-name="T9"><text:line-break/></text:span><text:span text:style-name="T5"> <text:s text:c="11"/></text:span><text:span text:style-name="T16"><text:s text:c="4"/>fs</text:span><text:span text:style-name="T29">[</text:span><text:span text:style-name="T16">n</text:span><text:span text:style-name="T29">]</text:span><text:span text:style-name="T16"> </text:span><text:span text:style-name="T29">=</text:span><text:span text:style-name="T16"> Util</text:span><text:span text:style-name="T29">.</text:span><text:span text:style-name="T30">Factorize</text:span><text:span text:style-name="T29">(</text:span><text:span text:style-name="T16">n</text:span><text:span text:style-name="T29">);</text:span><text:span text:style-name="T9"><text:line-break/></text:span><text:span text:style-name="T5"> <text:s text:c="11"/></text:span><text:span text:style-name="T16"><text:s text:c="4"/></text:span><text:span text:style-name="T29">});</text:span><text:span text:style-name="T9"><text:line-break/></text:span><text:span text:style-name="T5"> <text:s text:c="11"/></text:span><text:span text:style-name="T16">t</text:span><text:span text:style-name="T29">.</text:span><text:span text:style-name="T30">Start</text:span><text:span text:style-name="T29">();</text:span><text:span text:style-name="T9"><text:line-break/></text:span><text:span text:style-name="T5"> <text:s text:c="11"/>ts</text:span><text:span text:style-name="T6">.</text:span><text:span text:style-name="T8">Add</text:span><text:span text:style-name="T6">(</text:span><text:span text:style-name="T5">t</text:span><text:span text:style-name="T6">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t </text:span><text:span text:style-name="T7">in</text:span><text:span text:style-name="T5"> ts</text:span><text:span text:style-name="T6">)</text:span><text:span text:style-name="T9"><text:line-break/></text:span><text:span text:style-name="T5"> <text:s text:c="7"/>t</text:span><text:span text:style-name="T6">.</text:span><text:span text:style-name="T8">Join</text:span><text:span text:style-name="T6">(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7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5: </text:span><text:span text:style-name="T1">B</text:span></text:p>
          </draw:text-box>
        </draw:frame>
        <draw:frame draw:name="Content Placeholder 2" presentation:style-name="pr2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B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</text:span><text:span text:style-name="T4">var</text:span><text:span text:style-name="T5"> ts </text:span><text:span text:style-name="T6">=</text:span><text:span text:style-name="T5"> </text:span><text:span text:style-name="T7">new</text:span><text:span text:style-name="T5"> List</text:span><text:span text:style-name="T6">&lt;</text:span><text:span text:style-name="T5">Task</text:span><text:span text:style-name="T6">&gt;(</text:span><text:span text:style-name="T5">_ns</text:span><text:span text:style-name="T6">.</text:span><text:span text:style-name="T8">Count</text:span><text:span text:style-name="T6">);</text:span><text:span text:style-name="T9"><text:line-break/></text:span><text:span text:style-name="T5"> <text:s text:c="7"/></text:span><text:span text:style-name="T7">while</text:span><text:span text:style-name="T5"> </text:span><text:span text:style-name="T6">(</text:span><text:span text:style-name="T5">_ns</text:span><text:span text:style-name="T6">.</text:span><text:span text:style-name="T8">TryTake</text:span><text:span text:style-name="T6">(</text:span><text:span text:style-name="T7">out</text:span><text:span text:style-name="T5"> </text:span><text:span text:style-name="T4">var</text:span><text:span text:style-name="T5"> n</text:span><text:span text:style-name="T6">))</text:span><text:span text:style-name="T9"><text:line-break/></text:span><text:span text:style-name="T5"> <text:s text:c="11"/></text:span><text:span text:style-name="T16">ts</text:span><text:span text:style-name="T29">.</text:span><text:span text:style-name="T30">Add</text:span><text:span text:style-name="T29">(</text:span><text:span text:style-name="T16">Task</text:span><text:span text:style-name="T29">.</text:span><text:span text:style-name="T30">Run</text:span><text:span text:style-name="T29">(()</text:span><text:span text:style-name="T16"> </text:span><text:span text:style-name="T29">=&gt;</text:span><text:span text:style-name="T16"> </text:span><text:span text:style-name="T29">{</text:span><text:span text:style-name="T9"><text:line-break/></text:span><text:span text:style-name="T5"> <text:s text:c="11"/></text:span><text:span text:style-name="T16"><text:s text:c="4"/>fs</text:span><text:span text:style-name="T29">[</text:span><text:span text:style-name="T16">n</text:span><text:span text:style-name="T29">]</text:span><text:span text:style-name="T16"> </text:span><text:span text:style-name="T29">=</text:span><text:span text:style-name="T16"> Util</text:span><text:span text:style-name="T29">.</text:span><text:span text:style-name="T30">Factorize</text:span><text:span text:style-name="T29">(</text:span><text:span text:style-name="T16">n</text:span><text:span text:style-name="T29">);</text:span><text:span text:style-name="T9"><text:line-break/></text:span><text:span text:style-name="T5"> <text:s text:c="11"/></text:span><text:span text:style-name="T16"><text:s text:c="4"/></text:span><text:span text:style-name="T29">})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t </text:span><text:span text:style-name="T7">in</text:span><text:span text:style-name="T5"> ts</text:span><text:span text:style-name="T6">)</text:span><text:span text:style-name="T9"><text:line-break/></text:span><text:span text:style-name="T5"> <text:s text:c="11"/>t</text:span><text:span text:style-name="T6">.</text:span><text:span text:style-name="T8">Wait</text:span><text:span text:style-name="T6">(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5: C</text:span></text:p>
          </draw:text-box>
        </draw:frame>
        <draw:frame draw:name="Content Placeholder 2" presentation:style-name="pr29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C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</text:span><text:span text:style-name="T16">Parallel</text:span><text:span text:style-name="T29">.</text:span><text:span text:style-name="T30">ForEach</text:span><text:span text:style-name="T29">(</text:span><text:span text:style-name="T16">_ns</text:span><text:span text:style-name="T29">,</text:span><text:span text:style-name="T16"> n </text:span><text:span text:style-name="T29">=&gt;</text:span><text:span text:style-name="T16"> </text:span><text:span text:style-name="T29">{</text:span><text:span text:style-name="T9"><text:line-break/></text:span><text:span text:style-name="T5"> <text:s text:c="7"/></text:span><text:span text:style-name="T16"><text:s text:c="4"/>fs</text:span><text:span text:style-name="T29">[</text:span><text:span text:style-name="T16">n</text:span><text:span text:style-name="T29">]</text:span><text:span text:style-name="T16"> </text:span><text:span text:style-name="T29">=</text:span><text:span text:style-name="T16"> Util</text:span><text:span text:style-name="T29">.</text:span><text:span text:style-name="T30">Factorize</text:span><text:span text:style-name="T29">(</text:span><text:span text:style-name="T16">n</text:span><text:span text:style-name="T29">);</text:span><text:span text:style-name="T9"><text:line-break/></text:span><text:span text:style-name="T5"> <text:s text:c="7"/></text:span><text:span text:style-name="T29">}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3"/></text:span><text:span text:style-name="T6">}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6</text:span></text:p>
          </draw:text-box>
        </draw:frame>
        <draw:frame draw:name="Content Placeholder 2" presentation:style-name="pr3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Waiter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;</text:span><text:span text:style-name="T9"><text:line-break/></text:span><text:span text:style-name="T6">}</text:span><text:span text:style-name="T9"><text:line-break/></text:span><text:span text:style-name="T5">IWaiter waiter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barrier </text:span><text:span text:style-name="T6">=</text:span><text:span text:style-name="T5"> </text:span><text:span text:style-name="T7">new</text:span><text:span text:style-name="T5"> </text:span><text:span text:style-name="T8">Barrier</text:span><text:span text:style-name="T6">(</text:span><text:span text:style-name="T5">n </text:span><text:span text:style-name="T6">+</text:span><text:span text:style-name="T5"> </text:span><text:span text:style-name="T15">1</text:span><text:span text:style-name="T6">)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0</text:span><text:span text:style-name="T6">;</text:span><text:span text:style-name="T5"> i </text:span><text:span text:style-name="T6">&lt;</text:span><text:span text:style-name="T5"> n</text:span><text:span text:style-name="T6">;</text:span><text:span text:style-name="T5"> i</text:span><text:span text:style-name="T6">++)</text:span><text:span text:style-name="T9"><text:line-break/></text:span><text:span text:style-name="T5"> <text:s text:c="3"/>waiter</text:span><text:span text:style-name="T6">.</text:span><text:span text:style-name="T8">Wait</text:span><text:span text:style-name="T6">(</text:span><text:span text:style-name="T5">barrier</text:span><text:span text:style-name="T6">);</text:span><text:span text:style-name="T9"><text:line-break/></text:span><text:span text:style-name="T5">barrier</text:span><text:span text:style-name="T6">.</text:span><text:span text:style-name="T8">SignalAndWait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6: A</text:span></text:p>
          </draw:text-box>
        </draw:frame>
        <draw:frame draw:name="Content Placeholder 2" presentation:style-name="pr3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WaiterA </text:span><text:span text:style-name="T6">:</text:span><text:span text:style-name="T5"> IRunner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11"/>barrier</text:span><text:span text:style-name="T6">.</text:span><text:span text:style-name="T8">SignalAndWait</text:span><text:span text:style-name="T6">();</text:span><text:span text:style-name="T9"><text:line-break/></text:span><text:span text:style-name="T5"> <text:s text:c="7"/></text:span><text:span text:style-name="T6">})</text:span><text:span text:style-name="T9"><text:line-break/></text:span><text:span text:style-name="T5"> <text:s text:c="7"/></text:span><text:span text:style-name="T6">.</text:span><text:span text:style-name="T8">Start</text:span><text:span text:style-name="T6">(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6: </text:span><text:span text:style-name="T1">B</text:span></text:p>
          </draw:text-box>
        </draw:frame>
        <draw:frame draw:name="Content Placeholder 2" presentation:style-name="pr3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WaiterB </text:span><text:span text:style-name="T6">:</text:span><text:span text:style-name="T5"> IRunner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</text:span><text:span text:style-name="T5"> </text:span><text:span text:style-name="T6">{</text:span><text:span text:style-name="T9"><text:line-break/></text:span><text:span text:style-name="T5"> <text:s text:c="7"/>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11"/>barrier</text:span><text:span text:style-name="T6">.</text:span><text:span text:style-name="T8">SignalAndWait</text:span><text:span text:style-name="T6">();</text:span><text:span text:style-name="T9"><text:line-break/></text:span><text:span text:style-name="T5"> <text:s text:c="7"/></text:span><text:span text:style-name="T6">}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7</text:span></text:p>
          </draw:text-box>
        </draw:frame>
        <draw:frame draw:name="Content Placeholder 2" presentation:style-name="pr3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Downloader </text:span><text:span text:style-name="T6">{</text:span><text:span text:style-name="T9"><text:line-break/></text:span><text:span text:style-name="T5"> <text:s text:c="3"/></text:span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;</text:span><text:span text:style-name="T9"><text:line-break/></text:span><text:span text:style-name="T6">}</text:span><text:span text:style-name="T9"><text:line-break/></text:span><text:span text:style-name="T5">IDownloader downloader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bytes </text:span><text:span text:style-name="T6">=</text:span><text:span text:style-name="T5"> Task</text:span><text:span text:style-name="T6">.</text:span><text:span text:style-name="T8">WhenAll</text:span><text:span text:style-name="T6">(</text:span><text:span text:style-name="T5">args</text:span><text:span text:style-name="T6">[</text:span><text:span text:style-name="T15">1</text:span><text:span text:style-name="T6">..].</text:span><text:span text:style-name="T8">Select</text:span><text:span text:style-name="T6">(</text:span><text:span text:style-name="T5">url </text:span><text:span text:style-name="T6">=&gt;</text:span><text:span text:style-name="T5"> downloader</text:span><text:span text:style-name="T6">.</text:span><text:span text:style-name="T8">Download</text:span><text:span text:style-name="T6">(</text:span><text:span text:style-name="T8">Fixup</text:span><text:span text:style-name="T6">(</text:span><text:span text:style-name="T5">url</text:span><text:span text:style-name="T6">)))).</text:span><text:span text:style-name="T8">Result</text:span><text:span text:style-name="T6">.</text:span><text:span text:style-name="T8">Sum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A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7: A</text:span></text:p>
          </draw:text-box>
        </draw:frame>
        <draw:frame draw:name="Content Placeholder 2" presentation:style-name="pr3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5"> </text:span><text:span text:style-name="T6">{</text:span><text:span text:style-name="T9"><text:line-break/></text:span><text:span text:style-name="T5"> <text:s text:c="3"/></text:span><text:span text:style-name="T4">int</text:span><text:span text:style-name="T5"> bytes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5"> <text:s text:c="3"/></text:span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bytes </text:span><text:span text:style-name="T6">=</text:span><text:span text:style-name="T5"> client</text:span><text:span text:style-name="T6">.</text:span><text:span text:style-name="T8">GetByteArrayAsync</text:span><text:span text:style-name="T6">(</text:span><text:span text:style-name="T5">url</text:span><text:span text:style-name="T6">).</text:span><text:span text:style-name="T8">Result</text:span><text:span text:style-name="T6">.</text:span><text:span text:style-name="T8">Length</text:span><text:span text:style-name="T6">;</text:span><text:span text:style-name="T9"><text:line-break/></text:span><text:span text:style-name="T5"> <text:s text:c="3"/></text:span><text:span text:style-name="T6">});</text:span><text:span text:style-name="T9"><text:line-break/></text:span><text:span text:style-name="T5"> <text:s text:c="3"/>t</text:span><text:span text:style-name="T6">.</text:span><text:span text:style-name="T8">Start</text:span><text:span text:style-name="T6">();</text:span><text:span text:style-name="T9"><text:line-break/></text:span><text:span text:style-name="T5"> <text:s text:c="3"/>t</text:span><text:span text:style-name="T6">.</text:span><text:span text:style-name="T8">Join</text:span><text:span text:style-name="T6">();</text:span><text:span text:style-name="T9"><text:line-break/></text:span><text:span text:style-name="T5"> <text:s text:c="3"/></text:span><text:span text:style-name="T7">return</text:span><text:span text:style-name="T5"> Task</text:span><text:span text:style-name="T6">.</text:span><text:span text:style-name="T8">FromResult</text:span><text:span text:style-name="T6">(</text:span><text:span text:style-name="T5">bytes</text:span><text:span text:style-name="T6">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B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7: </text:span><text:span text:style-name="T1">B</text:span></text:p>
          </draw:text-box>
        </draw:frame>
        <draw:frame draw:name="Content Placeholder 2" presentation:style-name="pr3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9"><text:line-break/></text:span><text:span text:style-name="T5"> <text:s text:c="3"/></text:span><text:span text:style-name="T6">=&gt;</text:span><text:span text:style-name="T5"> 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client</text:span><text:span text:style-name="T9"><text:line-break/></text:span><text:span text:style-name="T5"> <text:s text:c="7"/></text:span><text:span text:style-name="T6">.</text:span><text:span text:style-name="T8">GetByteArrayAsync</text:span><text:span text:style-name="T6">(</text:span><text:span text:style-name="T5">url</text:span><text:span text:style-name="T6">)</text:span><text:span text:style-name="T9"><text:line-break/></text:span><text:span text:style-name="T5"> <text:s text:c="7"/></text:span><text:span text:style-name="T6">.</text:span><text:span text:style-name="T8">ContinueWith</text:span><text:span text:style-name="T6">(</text:span><text:span text:style-name="T5">t </text:span><text:span text:style-name="T6">=&gt;</text:span><text:span text:style-name="T5"> t</text:span><text:span text:style-name="T6">.</text:span><text:span text:style-name="T8">Result</text:span><text:span text:style-name="T6">.</text:span><text:span text:style-name="T8">Length</text:span><text:span text:style-name="T6">)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C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7: C</text:span></text:p>
          </draw:text-box>
        </draw:frame>
        <draw:frame draw:name="Content Placeholder 2" presentation:style-name="pr3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async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9"><text:line-break/></text:span><text:span text:style-name="T6">{</text:span><text:span text:style-name="T9"><text:line-break/></text:span><text:span text:style-name="T5"> <text:s text:c="3"/></text:span><text:span text:style-name="T4">var</text:span><text:span text:style-name="T5"> bytes </text:span><text:span text:style-name="T6">=</text:span><text:span text:style-name="T5"> await client</text:span><text:span text:style-name="T6">.</text:span><text:span text:style-name="T8">GetByteArrayAsync</text:span><text:span text:style-name="T6">(</text:span><text:span text:style-name="T5">url</text:span><text:span text:style-name="T6">);</text:span><text:span text:style-name="T9"><text:line-break/></text:span><text:span text:style-name="T5"> <text:s text:c="3"/></text:span><text:span text:style-name="T7">return</text:span><text:span text:style-name="T5"> bytes</text:span><text:span text:style-name="T6">.</text:span><text:span text:style-name="T8">Length</text:span><text:span text:style-name="T6">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C behind the scenes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7: C behind the scene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The C# compiler generates an </text:span><text:span text:style-name="T12">abstract state-machine</text:span><text:span text:style-name="T3"> that handles task resumption and exceptions more robustly than </text:span><text:span text:style-name="T14">Task.ContinueWith()</text:span><text:span text:style-name="T3">!</text:span></text:p>
            <text:p text:style-name="P8"><text:span text:style-name="T14"/></text:p>
            <text:p text:style-name="P8"><text:span text:style-name="T22">$ ilspycmd -lv CSharp4 -t AsyncDownloader bin/Release/net10.0/07.dll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ke-Aways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ake-Away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Shared mutable state is the root of all evil.</text:span></text:p>
            <text:list text:style-name="L2">
              <text:list-item>
                <text:p text:style-name="P8"><text:span text:style-name="T3">Purely functional program guards against this; but</text:span></text:p>
              </text:list-item>
              <text:list-item>
                <text:p text:style-name="P8"><text:span text:style-name="T3">there is still state </text:span><text:span text:style-name="T11">somewhere</text:span><text:span text:style-name="T3">, so beware!</text:span></text:p>
              </text:list-item>
              <text:list-item>
                <text:p text:style-name="P8"><text:span text:style-name="T3">Different models of concurrency: message passing, actors etc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ommended Reading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commended Reading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list text:style-name="L2">
              <text:list-item>
                <text:p text:style-name="P6"><text:span text:style-name="T3">“Java Concurrency in Practice”, Brian Goetz with Tim Peierls et al., 2006</text:span></text:p>
              </text:list-item>
              <text:list-item>
                <text:p text:style-name="P6"><text:span text:style-name="T3">“C# Precisely”, Peter Sestoft, 2nd edition, 2012</text:span></text:p>
              </text:list-item>
              <text:list-item>
                <text:p text:style-name="P6"><text:span text:style-name="T3">“The Art of Multiprocessor Programming”, Herlihy &amp; Shavit, 2012</text:span></text:p>
              </text:list-item>
              <text:list-item>
                <text:p text:style-name="P6"><text:span text:style-name="T3">“Teaching Programming languages by experimental and adversarial thinking.”, Pombrio, J., Krishnamurthi, S. &amp; Fisler, K., SNAPL 2017</text:span></text:p>
              </text:list-item>
              <text:list-item>
                <text:p text:style-name="P6"><text:span text:style-name="T3">https://github.com/shriram/mystery-languag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center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normal" style:font-name-complex="Noto Sans Devanagari" style:font-family-complex="'Noto Sans Devanagari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3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bold" style:font-name-complex="Noto Sans Devanagari" style:font-family-complex="'Noto Sans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08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08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74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.5pt" style:font-style-asian="normal" style:font-weight-asian="normal" style:font-name-complex="Noto Sans Devanagari" style:font-family-complex="'Noto Sans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bold" style:font-name-complex="Noto Sans Devanagari" style:font-family-complex="'Noto Sans Devanagari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74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.5pt" style:font-style-asian="normal" style:font-weight-asian="normal" style:font-name-complex="Noto Sans Devanagari" style:font-family-complex="'Noto Sans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bold" style:font-name-complex="Noto Sans Devanagari" style:font-family-complex="'Noto Sans Devanagari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2.386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33pt"/>
    </style:style>
    <style:style style:name="MP7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P11" style:family="paragraph">
      <style:paragraph-properties fo:text-align="center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3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8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30pt"/>
    </style:style>
    <style:style style:name="MP20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15pt"/>
    </style:style>
    <style:style style:name="MP22" style:family="paragraph">
      <style:paragraph-properties fo:margin-left="0cm" fo:margin-right="0cm" fo:margin-top="0.095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23" style:family="paragraph">
      <loext:graphic-properties draw:fill="none"/>
      <style:paragraph-properties fo:text-align="left" style:font-independent-line-spacing="true"/>
      <style:text-properties fo:font-size="21pt"/>
    </style:style>
    <style:style style:name="MP24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left" style:font-independent-line-spacing="true"/>
      <style:text-properties fo:font-size="18pt"/>
    </style:style>
    <style:style style:name="MP26" style:family="paragraph">
      <style:paragraph-properties fo:margin-left="0cm" fo:margin-right="0cm" fo:margin-top="0.095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085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 fo:margin-left="0cm" fo:margin-right="0cm" fo:margin-top="0.074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loext:graphic-properties draw:fill="none"/>
      <style:paragraph-properties fo:text-align="left" style:font-independent-line-spacing="true"/>
      <style:text-properties fo:font-size="10.5pt"/>
    </style:style>
    <style:style style:name="MP30" style:family="paragraph">
      <style:paragraph-properties fo:text-align="lef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-0.953cm"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Subtitle 2" presentation:style-name="Mpr2" draw:text-style-name="MP8" draw:layer="backgroundobjects" svg:width="17.779cm" svg:height="3.65cm" svg:x="3.81cm" svg:y="8.096cm" presentation:class="subtitle" presentation:user-transformed="true">
        <draw:text-box>
          <text:p text:style-name="MP7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subti</text:span><text:span text:style-name="MT3">tle </text:span><text:span text:style-name="MT3">style</text:span></text:p>
        </draw:text-box>
      </draw:frame>
      <draw:frame draw:name="Date Placeholder 3" presentation:style-name="Mpr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3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24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Vertical Text Placeholder 2" presentation:style-name="Mpr7" draw:text-style-name="MP17" draw:layer="backgroundobjects" svg:width="22.859cm" svg:height="9.428cm" svg:x="1.27cm" svg:y="3.334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24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12" draw:text-style-name="MP17" draw:layer="backgroundobjects" svg:width="16.721cm" svg:height="12.19cm" svg:x="1.27cm" svg:y="0.572cm" presentation:class="outline" presentation:user-transformed="true">
        <draw:text-box>
          <text:list text:style-name="ML4">
            <text:list-item>
              <text:p text:style-name="MP13"><text:span text:style-name="MT5">Click to edit </text:span><text:span text:style-name="MT5">Master text </text:span><text:span text:style-name="MT5">styles</text:span></text:p>
              <text:list>
                <text:list-item>
                  <text:p text:style-name="MP14"><text:span text:style-name="MT6">Second </text:span><text:span text:style-name="MT6">level</text:span></text:p>
                  <text:list>
                    <text:list-item>
                      <text:p text:style-name="MP15"><text:span text:style-name="MT7">Third </text:span><text:span text:style-name="MT7">level</text:span></text:p>
                      <text:list>
                        <text:list-item>
                          <text:p text:style-name="MP16"><text:span text:style-name="MT8">Fo</text:span><text:span text:style-name="MT8">urt</text:span><text:span text:style-name="MT8">h </text:span><text:span text:style-name="MT8">lev</text:span><text:span text:style-name="MT8">el</text:span></text:p>
                          <text:list>
                            <text:list-item>
                              <text:p text:style-name="MP16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3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24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Content Placeholder 2" presentation:style-name="Mpr17" draw:text-style-name="MP17" draw:layer="backgroundobjects" svg:width="22.859cm" svg:height="9.428cm" svg:x="1.27cm" svg:y="3.334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24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2.837cm" svg:x="2.006cm" svg:y="9.181cm" presentation:class="title" presentation:user-transformed="true">
        <draw:text-box>
          <text:p text:style-name="MP18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</text:span><text:span text:style-name="MT9">le </text:span><text:span text:style-name="MT9">sty</text:span><text:span text:style-name="MT9">le</text:span></text:p>
        </draw:text-box>
      </draw:frame>
      <draw:frame draw:name="Text Placeholder 2" presentation:style-name="Mpr22" draw:text-style-name="MP21" draw:layer="backgroundobjects" svg:width="21.589cm" svg:height="3.124cm" svg:x="2.006cm" svg:y="6.056cm" presentation:class="outline" presentation:user-transformed="true">
        <draw:text-box>
          <text:list text:style-name="ML5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Date Placeholder 3" presentation:style-name="Mpr2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23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2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24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Content Placeholder 2" presentation:style-name="Mpr27" draw:text-style-name="MP23" draw:layer="backgroundobjects" svg:width="11.217cm" svg:height="9.428cm" svg:x="1.27cm" svg:y="3.334cm" presentation:class="outline" presentation:user-transformed="true">
        <draw:text-box>
          <text:list text:style-name="ML4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22"><text:span text:style-name="MT11">Fourth level</text:span></text:p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3" draw:layer="backgroundobjects" svg:width="11.217cm" svg:height="9.428cm" svg:x="12.912cm" svg:y="3.334cm" presentation:class="outline" presentation:user-transformed="true">
        <draw:text-box>
          <text:list text:style-name="ML6">
            <text:list-item>
              <text:p text:style-name="MP14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2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2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24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Text Placeholder 2" presentation:style-name="Mpr32" draw:text-style-name="MP25" draw:layer="backgroundobjects" svg:width="11.222cm" svg:height="1.332cm" svg:x="1.27cm" svg:y="3.198cm" presentation:class="outline" presentation:user-transformed="true">
        <draw:text-box>
          <text:list text:style-name="ML4">
            <text:list-item>
              <text:p text:style-name="MP2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25" draw:layer="backgroundobjects" svg:width="11.222cm" svg:height="8.231cm" svg:x="1.27cm" svg:y="4.53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5" draw:layer="backgroundobjects" svg:width="11.226cm" svg:height="1.332cm" svg:x="12.903cm" svg:y="3.198cm" presentation:class="outline" presentation:user-transformed="true">
        <draw:text-box>
          <text:p text:style-name="MP24"><text:span text:style-name="MT12">Click to edit Master text styles</text:span></text:p>
        </draw:text-box>
      </draw:frame>
      <draw:frame draw:name="Content Placeholder 5" presentation:style-name="Mpr33" draw:text-style-name="MP25" draw:layer="backgroundobjects" svg:width="11.226cm" svg:height="8.231cm" svg:x="12.903cm" svg:y="4.53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7" presentation:style-name="Mpr34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8" presentation:style-name="Mpr34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24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Date Placeholder 2" presentation:style-name="Mpr3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3" presentation:style-name="Mpr3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4" presentation:style-name="Mpr3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24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2" presentation:style-name="Mpr41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3" presentation:style-name="Mpr41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24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2.42cm" svg:x="1.27cm" svg:y="0.569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Content Placeholder 2" presentation:style-name="Mpr45" draw:text-style-name="MP17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9" draw:layer="backgroundobjects" svg:width="8.355cm" svg:height="9.772cm" svg:x="1.27cm" svg:y="2.99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46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46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46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24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18cm" svg:x="4.979cm" svg:y="10.001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Picture Placeholder 2" presentation:style-name="Mpr50" draw:text-style-name="MP17" draw:layer="backgroundobjects" svg:width="15.239cm" svg:height="8.572cm" svg:x="4.979cm" svg:y="1.277cm" presentation:class="outline" presentation:user-transformed="true">
        <draw:text-box>
          <text:list text:style-name="ML5">
            <text:list-item>
              <text:p text:style-name="MP30"><text:span text:style-name="MT16">Click to edit the outline text format</text:span></text:p>
              <text:list>
                <text:list-item>
                  <text:p text:style-name="MP30"><text:span text:style-name="MT16">Second Outline Level</text:span></text:p>
                  <text:list>
                    <text:list-item>
                      <text:p text:style-name="MP30"><text:span text:style-name="MT16">Third Outline Level</text:span></text:p>
                      <text:list>
                        <text:list-item>
                          <text:p text:style-name="MP30"><text:span text:style-name="MT16">Fourth Outline Level</text:span></text:p>
                          <text:list>
                            <text:list-item>
                              <text:p text:style-name="MP30"><text:span text:style-name="MT16">Fifth Outline Level</text:span></text:p>
                              <text:list>
                                <text:list-item>
                                  <text:p text:style-name="MP30"><text:span text:style-name="MT16">Sixth Outline Level</text:span></text:p>
                                  <text:list>
                                    <text:list-item>
                                      <text:p text:style-name="MP30"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29" draw:layer="backgroundobjects" svg:width="15.239cm" svg:height="1.676cm" svg:x="4.979cm" svg:y="11.182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5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52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52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24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.NET Threading Mysteries</dc:title>
    <meta:initial-creator>Florian Biermann</meta:initial-creator>
    <meta:creation-date>2026-06-17T11:00:56</meta:creation-date>
    <dc:date>2026-06-19T09:43:31.753440460</dc:date>
    <meta:editing-duration>PT20H35M48S</meta:editing-duration>
    <meta:editing-cycles>7</meta:editing-cycles>
    <meta:generator>LibreOffice/26.2.3.2$Linux_X86_64 LibreOffice_project/d4d5ed47b6084125f28d269a5650105d54dde034</meta:generator>
    <meta:document-statistic meta:object-count="312"/>
    <meta:user-defined meta:name="email">florian.biermann@protonmail.com</meta:user-defined>
    <meta:user-defined meta:name="monofont">Fira Code</meta:user-defined>
    <meta:user-defined meta:name="monofont-size">16</meta:user-defined>
  </office:meta>
</office:document-meta>
</file>